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ading One</text:h>
      <text:p text:style-name="Standard">Body paragraph text</text:p>
      <text:p text:style-name="Standard">Tab<text:tab/>separated</text:p>
      <text:p text:style-name="Standard">Line one<text:line-break/>line tw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ocument header text</text:p>
      </style:header>
      <style:footer>
        <text:p text:style-name="Footer">Page footer tex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6" meta:word-count="17" meta:character-count="96" meta:non-whitespace-character-count="85"/>
    <meta:generator>LibreOffice/25.8.7.3$Linux_X86_64 LibreOffice_project/580$Build-3</meta:generator>
  </office:meta>
</office:document-meta>
</file>